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220000031B78EB5A84.png" manifest:media-type="image/png"/>
  <manifest:file-entry manifest:full-path="Pictures/100000010000064600000360F5825D92.png" manifest:media-type="image/png"/>
  <manifest:file-entry manifest:full-path="Pictures/100000010000022B0000029BCD31D701.png" manifest:media-type="image/png"/>
  <manifest:file-entry manifest:full-path="Pictures/10000001000002E800000317A1ECFAA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138e6b" officeooo:paragraph-rsid="00138e6b"/>
    </style:style>
    <style:style style:name="P2" style:family="paragraph" style:parent-style-name="Text_20_body">
      <style:text-properties officeooo:rsid="0014425c" officeooo:paragraph-rsid="0014425c"/>
    </style:style>
    <style:style style:name="P3" style:family="paragraph" style:parent-style-name="Text_20_body">
      <style:text-properties officeooo:paragraph-rsid="0014425c"/>
    </style:style>
    <style:style style:name="P4" style:family="paragraph" style:parent-style-name="Standard">
      <style:text-properties officeooo:rsid="00138e6b" officeooo:paragraph-rsid="00138e6b"/>
    </style:style>
    <style:style style:name="P5" style:family="paragraph" style:parent-style-name="Heading_20_2">
      <style:text-properties officeooo:rsid="0014425c" officeooo:paragraph-rsid="0014425c"/>
    </style:style>
    <style:style style:name="P6" style:family="paragraph" style:parent-style-name="Heading_20_2">
      <style:text-properties officeooo:rsid="0014425c"/>
    </style:style>
    <style:style style:name="P7" style:family="paragraph" style:parent-style-name="Text_20_body">
      <style:text-properties officeooo:rsid="0016fab1" officeooo:paragraph-rsid="0016fab1"/>
    </style:style>
    <style:style style:name="P8" style:family="paragraph" style:parent-style-name="Text_20_body">
      <style:text-properties fo:font-weight="normal" officeooo:rsid="0016fab1" officeooo:paragraph-rsid="0016fab1" style:font-weight-asian="normal" style:font-weight-complex="normal"/>
    </style:style>
    <style:style style:name="P9" style:family="paragraph" style:parent-style-name="Heading_20_1">
      <style:text-properties officeooo:rsid="001800ef" officeooo:paragraph-rsid="001800ef"/>
    </style:style>
    <style:style style:name="P10" style:family="paragraph" style:parent-style-name="Text_20_body">
      <style:text-properties officeooo:rsid="001800ef" officeooo:paragraph-rsid="001800ef"/>
    </style:style>
    <style:style style:name="P11" style:family="paragraph" style:parent-style-name="Heading_20_2">
      <style:text-properties officeooo:rsid="001a905d" officeooo:paragraph-rsid="001a905d"/>
    </style:style>
    <style:style style:name="P12" style:family="paragraph" style:parent-style-name="Text_20_body">
      <style:text-properties officeooo:rsid="001a905d" officeooo:paragraph-rsid="001a905d"/>
    </style:style>
    <style:style style:name="T1" style:family="text">
      <style:text-properties officeooo:rsid="001c30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00ef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Mapa</text:h>
      <text:p text:style-name="P2">Aquí se mostrarán los negocios en su respectiva ubicación. Habrá varios colores dependien<text:span text:style-name="T1">d</text:span>o de la categoría, y el usuario podrá filtrar dentro del mapa.</text:p>
      <text:p text:style-name="P3"/>
      <text:h text:style-name="P1" text:outline-level="2">Página principal</text:h>
      <text:p text:style-name="P4">Aquí habrá una sección para los <text:span text:style-name="T2">más visitados</text:span>, otra para los destacados y una última para los más valorados (podemos poner otra sección para los que tengan más favoritos si quieres).</text:p>
      <text:p text:style-name="P4"><draw:frame draw:style-name="fr1" draw:name="Imagen1" text:anchor-type="char" svg:width="17cm" svg:height="8.608cm" draw:z-index="0"><draw:image xlink:href="Pictures/10000001000006220000031B78EB5A84.png" xlink:type="simple" xlink:show="embed" xlink:actuate="onLoad" draw:mime-type="image/png"/></draw:frame></text:p>
      <text:p text:style-name="P4"/>
      <text:p text:style-name="P4">Los destacados vienen de las cuentas <text:span text:style-name="T2">premium</text:span>. Los usuarios que paguen este plan tendrán derecho a marcar uno de sus negocios como premium, para que aparezca en esta sección.</text:p>
      <text:p text:style-name="P4"/>
      <text:p text:style-name="P4"/>
      <text:h text:style-name="P5" text:outline-level="2">Directorio</text:h>
      <text:p text:style-name="P2">Página en la que se mostrarán todos los negocios inscritos en la app. Habrá múltiples filtros para poder encontrar distintos negocios en función de las necesidades de los usuarios.</text:p>
      <text:p text:style-name="P3"/>
      <text:h text:style-name="Heading_20_2" text:outline-level="2"><draw:frame draw:style-name="fr2" draw:name="Imagen2" text:anchor-type="char" svg:x="0cm" svg:y="0.235cm" svg:width="17cm" svg:height="9.146cm" draw:z-index="1"><draw:image xlink:href="Pictures/100000010000064600000360F5825D92.png" xlink:type="simple" xlink:show="embed" xlink:actuate="onLoad" draw:mime-type="image/png"/></draw:frame><text:soft-page-break/></text:h>
      <text:h text:style-name="P6" text:outline-level="2" text:is-list-header="true">Planes</text:h>
      <text:p text:style-name="P2">Existen 3 planes distintos para los usuarios profesionales. Aquí hay que afinar la lógica en base a cómo consideres oportuno. Podemos añadir las características que me digas.</text:p>
      <text:p text:style-name="P2"><draw:frame draw:style-name="fr3" draw:name="Imagen3" text:anchor-type="char" svg:x="2.332cm" svg:y="-0.166cm" svg:width="12.338cm" svg:height="13.116cm" draw:z-index="2"><draw:image xlink:href="Pictures/10000001000002E800000317A1ECFAA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2"><text:soft-page-break/>Panel de administración de usuarios profesionales</text:h>
      <text:p text:style-name="P2">Aquí los usuarios profesionales pueden afinar todo lo relativo a sus negocios.</text:p>
      <text:p text:style-name="P3"/>
      <text:p text:style-name="P3"><draw:frame draw:style-name="fr2" draw:name="Imagen4" text:anchor-type="char" svg:x="1.157cm" svg:y="0.178cm" svg:width="14.686cm" svg:height="17.649cm" draw:z-index="3"><draw:image xlink:href="Pictures/100000010000022B0000029BCD31D701.png" xlink:type="simple" xlink:show="embed" xlink:actuate="onLoad" draw:mime-type="image/png"/></draw:frame></text:p>
      <text:p text:style-name="P7">Podremos movernos desde las distintas pestañas para gestionar los negocios y ver sus estadísticas.</text:p>
      <text:p text:style-name="P7">Las <text:span text:style-name="T2">visitas</text:span><text:span text:style-name="T3"> </text:span><text:span text:style-name="T4">computan</text:span><text:span text:style-name="T3"> una sola vez por usuario y mes.</text:span></text:p>
      <text:p text:style-name="P8"/>
      <text:p text:style-name="P8"/>
      <text:p text:style-name="P8"/>
      <text:p text:style-name="P8"/>
      <text:h text:style-name="P9" text:outline-level="1"><text:soft-page-break/>Valoraciones</text:h>
      <text:p text:style-name="P10">Un usuario solo podrá valorar un negocio si ha estado en él. Para controlar esto se facilita a los usuarios profesionales un apartado para descargar un código QR asociado a su negocio, de tal forma que al escanearlo dirija a los clientes directamente a la pantalla de valoración.</text:p>
      <text:p text:style-name="P10"/>
      <text:h text:style-name="P11" text:outline-level="2">Panel de administrador (en desarrollo)</text:h>
      <text:p text:style-name="P12">Tendrás un panel de administrador en el que podrás gestionar los usuarios de la app, modificar precios de los planes, etc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7T08:38:58.224847200</meta:creation-date>
    <dc:date>2026-04-27T16:09:42.976277800</dc:date>
    <meta:editing-duration>PT6H18M45S</meta:editing-duration>
    <meta:editing-cycles>4</meta:editing-cycles>
    <meta:generator>LibreOffice/26.2.1.2$Windows_X86_64 LibreOffice_project/620$Build-2</meta:generator>
    <meta:print-date>2026-04-27T16:05:56.202542400</meta:print-date>
    <meta:printed-by>Archivos PDF</meta:printed-by>
    <meta:document-statistic meta:table-count="0" meta:image-count="4" meta:object-count="0" meta:page-count="4" meta:paragraph-count="17" meta:word-count="262" meta:character-count="1625" meta:non-whitespace-character-count="1380"/>
  </office:meta>
</office:document-meta>
</file>